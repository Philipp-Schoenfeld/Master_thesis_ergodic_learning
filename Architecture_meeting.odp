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40000030DCE9D3322.png" manifest:media-type="image/png"/>
  <manifest:file-entry manifest:full-path="Pictures/100000010000027C0000020AA877F23D.png" manifest:media-type="image/png"/>
  <manifest:file-entry manifest:full-path="Pictures/10000001000002590000020AECC828A8.png" manifest:media-type="image/png"/>
  <manifest:file-entry manifest:full-path="Pictures/10000001000003140000030D03F3A5A6.png" manifest:media-type="image/png"/>
  <manifest:file-entry manifest:full-path="Pictures/100000010000025A0000020E86DEBF1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8.64cm" fo:min-width="5.8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8.64cm" fo:min-width="2.677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2.29cm" fo:min-width="4.582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3.633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8.64cm" fo:min-width="2.67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center" draw:textarea-vertical-align="middle" loext:decorative="false"/>
    </style:style>
    <style:style style:name="gr13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7" style:family="graphic">
      <style:graphic-properties style:protect="size" loext:decorative="false"/>
    </style:style>
    <style:style style:name="gr18" style:family="graphic" style:parent-style-name="standard">
      <style:graphic-properties draw:fill-color="#81d41a" draw:textarea-horizontal-align="justify" draw:textarea-vertical-align="middle" draw:auto-grow-height="false" fo:min-height="5.538cm" fo:min-width="4.582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ffff6d" draw:textarea-horizontal-align="justify" draw:textarea-vertical-align="middle" draw:auto-grow-height="false" fo:min-height="8.64cm" fo:min-width="2.675cm" style:writing-mode="lr-tb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title">
      <style:graphic-properties fo:min-height="2.63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81d41a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9" style:family="paragraph"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6d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.499cm" fo:margin-bottom="0cm" fo:text-indent="0cm"/>
      <style:text-properties fo:font-size="16pt" style:font-size-asian="16pt" style:font-size-complex="16pt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paragraph-properties fo:margin-left="0cm" fo:margin-right="0cm" fo:margin-top="0.499cm" fo:margin-bottom="0cm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35cm" svg:height="8.89cm" svg:x="2.322cm" svg:y="3.7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7cm" svg:height="8.89cm" svg:x="9.306cm" svg:y="3.102cm">
          <text:p text:style-name="P2"><text:span text:style-name="T1">Flow-Matching</text:span></text:p>
          <text:p text:style-name="P2"><text:span text:style-name="T1">Network</text:span></text:p>
          <text:p text:style-name="P2"><text:span text:style-name="T1"/></text:p>
          <text:p text:style-name="P2"><text:span text:style-name="T1">(Context-Aware Conditional Flow Matching)</text:span></text:p>
          <text:p text:style-name="P2"><text:span text:style-name="T2">(Flow-Opt, Spline-Flow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082cm" svg:height="2.54cm" svg:x="2.954cm" svg:y="8.182cm">
          <text:p text:style-name="P4"><text:span text:style-name="T1">Target distribution 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082cm" svg:height="2.54cm" svg:x="2.954cm" svg:y="5.007cm">
          <text:p text:style-name="P4"><text:span text:style-name="T1">Obstacle 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3.81cm" svg:height="1.74cm" svg:x="-0.002cm" svg:y="5.642cm">
          <draw:text-box>
            <text:p><text:span text:style-name="T1">Obstacles</text:span></text:p>
          </draw:text-box>
        </draw:frame>
        <draw:frame draw:style-name="gr5" draw:text-style-name="P6" draw:layer="layout" svg:width="3.81cm" svg:height="3.883cm" svg:x="-0.002cm" svg:y="8.817cm">
          <draw:text-box>
            <text:p><text:span text:style-name="T1">Target distribution</text:span></text:p>
          </draw:text-box>
        </draw:frame>
        <draw:line draw:style-name="gr6" draw:text-style-name="P7" draw:layer="layout" svg:x1="1.905cm" svg:y1="6.35cm" svg:x2="3.807cm" svg:y2="6.277cm">
          <text:p/>
        </draw:line>
        <draw:line draw:style-name="gr7" draw:text-style-name="P7" draw:layer="layout" svg:x1="1.905cm" svg:y1="9.525cm" svg:x2="3.807cm" svg:y2="9.452cm">
          <text:p/>
        </draw:line>
        <draw:line draw:style-name="gr8" draw:text-style-name="P7" draw:layer="layout" svg:x1="8.035cm" svg:y1="6.277cm" svg:x2="9.305cm" svg:y2="6.277cm">
          <text:p/>
        </draw:line>
        <draw:line draw:style-name="gr9" draw:text-style-name="P7" draw:layer="layout" svg:x1="8.035cm" svg:y1="9.452cm" svg:x2="9.305cm" svg:y2="9.452cm">
          <text:p/>
        </draw:line>
        <draw:frame draw:style-name="gr4" draw:text-style-name="P6" draw:layer="layout" svg:width="2.541cm" svg:height="1.74cm" svg:x="12.482cm" svg:y="6.515cm">
          <draw:text-box>
            <text:p><text:span text:style-name="T1">B-Spline Control points</text:span></text:p>
          </draw:text-box>
        </draw:frame>
        <draw:line draw:style-name="gr10" draw:text-style-name="P7" draw:layer="layout" svg:x1="12.482cm" svg:y1="8.255cm" svg:x2="14.388cm" svg:y2="8.255cm">
          <text:p/>
        </draw:line>
        <draw:frame draw:style-name="gr4" draw:text-style-name="P6" draw:layer="layout" svg:width="5.08cm" svg:height="1.74cm" svg:x="2.957cm" svg:y="2.633cm">
          <draw:text-box>
            <text:p><text:span text:style-name="T1">Context Vector</text:span></text:p>
          </draw:text-box>
        </draw:frame>
        <draw:custom-shape draw:style-name="gr11" draw:text-style-name="P9" xml:id="id1" draw:id="id1" draw:layer="layout" svg:width="3.175cm" svg:height="8.89cm" svg:x="14.388cm" svg:y="3.175cm">
          <text:p text:style-name="P8"><text:span text:style-name="T1">Initialization Network</text:span></text:p>
          <text:p text:style-name="P8"><text:span text:style-name="T3"/></text:p>
          <text:p text:style-name="P8"><text:span text:style-name="T1">lightweight Transformer</text:span></text:p>
          <text:p text:style-name="P8"><text:span text:style-name="T2">(Flow-O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0" draw:layer="layout" draw:line-skew="1.373cm" svg:x1="15.975cm" svg:y1="12.065cm" svg:x2="5.269cm" svg:y2="12.628cm" draw:start-shape="id1" draw:start-glue-point="2" svg:d="M15975 12065v1905h-10706v-1342" svg:viewBox="0 0 10707 1906">
          <text:p/>
        </draw:connector>
        <draw:line draw:style-name="gr13" draw:text-style-name="P7" draw:layer="layout" svg:x1="15.975cm" svg:y1="13.335cm" svg:x2="15.975cm" svg:y2="12.065cm">
          <text:p/>
        </draw:line>
        <draw:frame draw:style-name="gr4" draw:text-style-name="P6" draw:layer="layout" svg:width="2.541cm" svg:height="1.74cm" svg:x="17.563cm" svg:y="5.08cm">
          <draw:text-box>
            <text:p><text:span text:style-name="T1">B-Spline Control points</text:span></text:p>
          </draw:text-box>
        </draw:frame>
        <draw:frame draw:style-name="gr4" draw:text-style-name="P6" draw:layer="layout" svg:width="3.175cm" svg:height="1.74cm" svg:x="17.563cm" svg:y="7.62cm">
          <draw:text-box>
            <text:p><text:span text:style-name="T1">Lagrangian Multipliers</text:span></text:p>
          </draw:text-box>
        </draw:frame>
        <draw:line draw:style-name="gr14" draw:text-style-name="P7" draw:layer="layout" svg:x1="17.563cm" svg:y1="6.985cm" svg:x2="19.685cm" svg:y2="6.985cm">
          <text:p/>
        </draw:line>
        <draw:line draw:style-name="gr15" draw:text-style-name="P7" draw:layer="layout" svg:x1="17.563cm" svg:y1="8.89cm" svg:x2="19.685cm" svg:y2="8.89cm">
          <text:p/>
        </draw:line>
        <draw:custom-shape draw:style-name="gr11" draw:text-style-name="P9" draw:layer="layout" svg:width="3.175cm" svg:height="8.89cm" svg:x="19.911cm" svg:y="3.251cm">
          <text:p text:style-name="P8"><text:span text:style-name="T3">TSVEC (Task-space Stein Variational Ergodic Coverage).</text:span></text:p>
          <text:p text:style-name="P8"><text:span text:style-name="T2">(Stein Variational Ergodic Surface Coverage with SE(3) Constraint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2.539cm" svg:height="1.74cm" svg:x="22.86cm" svg:y="6.985cm">
          <draw:text-box>
            <text:p><text:span text:style-name="T1">Final trajectory</text:span></text:p>
          </draw:text-box>
        </draw:frame>
        <draw:line draw:style-name="gr16" draw:text-style-name="P7" draw:layer="layout" svg:x1="23.495cm" svg:y1="8.255cm" svg:x2="25.399cm" svg:y2="8.255cm">
          <text:p/>
        </draw:lin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6.35cm" svg:height="8.89cm" svg:x="2.322cm" svg:y="3.7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7cm" svg:height="8.89cm" svg:x="9.306cm" svg:y="3.102cm">
          <text:p text:style-name="P2"><text:span text:style-name="T1">Flow-Matching</text:span></text:p>
          <text:p text:style-name="P2"><text:span text:style-name="T1">Network</text:span></text:p>
          <text:p text:style-name="P2"><text:span text:style-name="T1"/></text:p>
          <text:p text:style-name="P2"><text:span text:style-name="T1">(Context-Aware Conditional Flow Matching)</text:span></text:p>
          <text:p text:style-name="P2"><text:span text:style-name="T2">(Flow-Opt, Spline-Flow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5.082cm" svg:height="5.788cm" svg:x="2.954cm" svg:y="5.007cm">
          <text:p text:style-name="P4"><text:span text:style-name="T1">Context 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1.907cm" svg:height="1.74cm" svg:x="-0.002cm" svg:y="5.642cm">
          <draw:text-box>
            <text:p><text:span text:style-name="T1">Obstacles</text:span></text:p>
            <text:p><text:span text:style-name="T1"/></text:p>
          </draw:text-box>
        </draw:frame>
        <draw:frame draw:style-name="gr5" draw:text-style-name="P6" draw:layer="layout" svg:width="3.81cm" svg:height="3.883cm" svg:x="19.685cm" svg:y="1.197cm">
          <draw:text-box>
            <text:p><text:span text:style-name="T1">Target distribution</text:span></text:p>
          </draw:text-box>
        </draw:frame>
        <draw:line draw:style-name="gr8" draw:text-style-name="P7" draw:layer="layout" svg:x1="8.035cm" svg:y1="6.277cm" svg:x2="9.305cm" svg:y2="6.277cm">
          <text:p/>
        </draw:line>
        <draw:line draw:style-name="gr9" draw:text-style-name="P7" draw:layer="layout" svg:x1="8.035cm" svg:y1="9.452cm" svg:x2="9.305cm" svg:y2="9.452cm">
          <text:p/>
        </draw:line>
        <draw:frame draw:style-name="gr4" draw:text-style-name="P6" draw:layer="layout" svg:width="2.541cm" svg:height="1.74cm" svg:x="14.604cm" svg:y="6.35cm">
          <draw:text-box>
            <text:p><text:span text:style-name="T1">B-Spline Control points</text:span></text:p>
          </draw:text-box>
        </draw:frame>
        <draw:line draw:style-name="gr10" draw:text-style-name="P7" draw:layer="layout" svg:x1="12.482cm" svg:y1="8.255cm" svg:x2="19.685cm" svg:y2="8.255cm">
          <text:p/>
        </draw:line>
        <draw:frame draw:style-name="gr4" draw:text-style-name="P6" draw:layer="layout" svg:width="5.08cm" svg:height="1.74cm" svg:x="2.957cm" svg:y="2.633cm">
          <draw:text-box>
            <text:p><text:span text:style-name="T1">Context Vector</text:span></text:p>
          </draw:text-box>
        </draw:frame>
        <draw:connector draw:style-name="gr12" draw:text-style-name="P10" draw:layer="layout" draw:line-skew="1.963cm" svg:x1="21.498cm" svg:y1="12.141cm" svg:x2="5.269cm" svg:y2="12.628cm" draw:start-shape="id2" draw:start-glue-point="2" svg:d="M21498 12141v2464h-16229v-1977" svg:viewBox="0 0 16230 2465">
          <text:p/>
        </draw:connector>
        <draw:line draw:style-name="gr13" draw:text-style-name="P7" draw:layer="layout" svg:x1="21.505cm" svg:y1="13.282cm" svg:x2="21.505cm" svg:y2="12.012cm">
          <text:p/>
        </draw:line>
        <draw:line draw:style-name="gr15" draw:text-style-name="P7" draw:layer="layout" svg:x1="20.32cm" svg:y1="2.54cm" svg:x2="20.32cm" svg:y2="3.175cm">
          <text:p/>
        </draw:line>
        <draw:custom-shape draw:style-name="gr19" draw:text-style-name="P12" xml:id="id2" draw:id="id2" draw:layer="layout" svg:width="3.175cm" svg:height="8.89cm" svg:x="19.911cm" svg:y="3.251cm">
          <text:p text:style-name="P8"><text:span text:style-name="T3">TSVEC (Task-space Stein Variational Ergodic Coverage).</text:span></text:p>
          <text:p text:style-name="P8"><text:span text:style-name="T2">(Stein Variational Ergodic Surface Coverage with SE(3) Constraint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2.539cm" svg:height="1.74cm" svg:x="22.86cm" svg:y="6.985cm">
          <draw:text-box>
            <text:p><text:span text:style-name="T1">Final trajectory</text:span></text:p>
          </draw:text-box>
        </draw:frame>
        <draw:line draw:style-name="gr16" draw:text-style-name="P7" draw:layer="layout" svg:x1="23.495cm" svg:y1="8.255cm" svg:x2="25.399cm" svg:y2="8.255cm">
          <text:p/>
        </draw:line>
        <draw:frame draw:style-name="gr4" draw:text-style-name="P6" draw:layer="layout" svg:width="1.907cm" svg:height="1.74cm" svg:x="-0.002cm" svg:y="8.255cm">
          <draw:text-box>
            <text:p><text:span text:style-name="T1">Bounding box</text:span></text:p>
          </draw:text-box>
        </draw:frame>
        <draw:line draw:style-name="gr8" draw:text-style-name="P7" draw:layer="layout" svg:x1="1.684cm" svg:y1="6.35cm" svg:x2="2.954cm" svg:y2="6.35cm">
          <text:p/>
        </draw:line>
        <draw:line draw:style-name="gr8" draw:text-style-name="P7" draw:layer="layout" svg:x1="1.684cm" svg:y1="8.89cm" svg:x2="2.954cm" svg:y2="8.89cm">
          <text:p/>
        </draw:line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2cm" svg:height="2.63cm" svg:x="1.4cm" svg:y="0.627cm" presentation:class="title">
          <draw:text-box>
            <text:p>SVGD no B-splines</text:p>
          </draw:text-box>
        </draw:frame>
        <draw:frame presentation:style-name="pr3" draw:layer="layout" svg:width="25.2cm" svg:height="9.134cm" svg:x="1.4cm" svg:y="3.684cm" presentation:class="outline" presentation:placeholder="true">
          <draw:text-box/>
        </draw:frame>
        <draw:frame draw:style-name="gr20" draw:text-style-name="P7" draw:layer="layout" svg:width="14.022cm" svg:height="12.252cm" svg:x="4.393cm" svg:y="2.54cm">
          <draw:image xlink:href="Pictures/100000010000025A0000020E86DEBF1C.png" xlink:type="simple" xlink:show="embed" xlink:actuate="onLoad" draw:mime-type="image/png">
            <text:p/>
          </draw:image>
        </draw:frame>
        <presentation:notes draw:style-name="dp2">
          <draw:page-thumbnail draw:style-name="gr17" draw:layer="layout" svg:width="19.798cm" svg:height="11.136cm" svg:x="0.6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2cm" svg:height="2.63cm" svg:x="1.4cm" svg:y="0.627cm" presentation:class="title">
          <draw:text-box>
            <text:p>SVGD with B-splines</text:p>
          </draw:text-box>
        </draw:frame>
        <draw:frame draw:style-name="gr20" draw:text-style-name="P7" draw:layer="layout" svg:width="14.083cm" svg:height="12.232cm" svg:x="7.507cm" svg:y="3.518cm">
          <draw:image xlink:href="Pictures/10000001000002590000020AECC828A8.png" xlink:type="simple" xlink:show="embed" xlink:actuate="onLoad" draw:mime-type="image/png">
            <text:p/>
          </draw:image>
        </draw:frame>
        <presentation:notes draw:style-name="dp2">
          <draw:page-thumbnail draw:style-name="gr17" draw:layer="layout" svg:width="19.798cm" svg:height="11.136cm" svg:x="0.6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2cm" svg:height="2.63cm" svg:x="1.4cm" svg:y="0.627cm" presentation:class="title" presentation:user-transformed="true">
          <draw:text-box>
            <text:p>SVGD with B-splines more control </text:p>
          </draw:text-box>
        </draw:frame>
        <draw:frame draw:style-name="gr20" draw:text-style-name="P7" draw:layer="layout" svg:width="16.192cm" svg:height="13.289cm" svg:x="7.62cm" svg:y="2.586cm">
          <draw:image xlink:href="Pictures/100000010000027C0000020AA877F23D.png" xlink:type="simple" xlink:show="embed" xlink:actuate="onLoad" draw:mime-type="image/png">
            <text:p/>
          </draw:image>
        </draw:frame>
        <presentation:notes draw:style-name="dp2">
          <draw:page-thumbnail draw:style-name="gr17" draw:layer="layout" svg:width="19.798cm" svg:height="11.136cm" svg:x="0.6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2cm" svg:height="2.63cm" svg:x="1.4cm" svg:y="0.627cm" presentation:class="title">
          <draw:text-box>
            <text:p>General Architecture</text:p>
          </draw:text-box>
        </draw:frame>
        <draw:frame presentation:style-name="pr3" draw:layer="layout" svg:width="25.2cm" svg:height="9.134cm" svg:x="1.4cm" svg:y="3.684cm" presentation:class="outline" presentation:user-transformed="true">
          <draw:text-box>
            <text:list text:style-name="L2">
              <text:list-item>
                <text:p>500 Training trajectories</text:p>
              </text:list-item>
              <text:list-item>
                <text:p>Conditional Flow Matching</text:p>
                <text:list>
                  <text:list-item>
                    <text:p>Conditional on starting position</text:p>
                  </text:list-item>
                  <text:list-item>
                    <text:p>Training flow so that trajectory at t=1 matches training trajectory</text:p>
                  </text:list-item>
                </text:list>
              </text:list-item>
              <text:list-item>
                <text:p>Explicit Euler to model final trajectory with the flow ODE</text:p>
              </text:list-item>
            </text:list>
          </draw:text-box>
        </draw:frame>
        <presentation:notes draw:style-name="dp2">
          <draw:page-thumbnail draw:style-name="gr17" draw:layer="layout" svg:width="19.798cm" svg:height="11.136cm" svg:x="0.6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2cm" svg:height="2.63cm" svg:x="1.4cm" svg:y="0.627cm" presentation:class="title">
          <draw:text-box>
            <text:p>MLP Architecture</text:p>
          </draw:text-box>
        </draw:frame>
        <draw:frame presentation:style-name="pr3" draw:text-style-name="P15" draw:layer="layout" svg:width="25.2cm" svg:height="9.134cm" svg:x="1.4cm" svg:y="3.684cm" presentation:class="outline" presentation:user-transformed="true">
          <draw:text-box>
            <text:list text:style-name="L2">
              <text:list-item>
                <text:p text:style-name="P14"><text:span text:style-name="T4">Linear layer → SiLU → Linear layer → </text:span><text:span text:style-name="T4"><text:line-break/></text:span><text:span text:style-name="T4">SiLU → </text:span><text:span text:style-name="T5">Linear layer</text:span></text:p>
              </text:list-item>
              <text:list-item>
                <text:p text:style-name="P14"><text:span text:style-name="T5">Erstmal radikales Overfitting auf einer </text:span><text:span text:style-name="T5"><text:line-break/></text:span><text:span text:style-name="T5">Trajektorie ausprobieren, um die Architekur </text:span><text:span text:style-name="T5"><text:line-break/></text:span><text:span text:style-name="T5">zu verifizieren und inkrementell mehr Daten</text:span><text:span text:style-name="T5"><text:line-break/></text:span><text:span text:style-name="T5">training hinzufügen</text:span></text:p>
              </text:list-item>
              <text:list-item>
                <text:p text:style-name="P14"><text:span text:style-name="T5">Erstmal einfach versuchen einen Flow zu lernen,</text:span><text:span text:style-name="T5"><text:line-break/></text:span><text:span text:style-name="T5">der einen Flow/ODE zu einer Zielform zu pushern</text:span><text:span text:style-name="T5"><text:line-break/></text:span><text:span text:style-name="T5">(muss erstmal garnicht ergodic sein)</text:span></text:p>
              </text:list-item>
              <text:list-item>
                <text:p text:style-name="P14"><text:span text:style-name="T5">Vlt. besser tiefes als breites Netzwerk z.B. 2x256</text:span></text:p>
              </text:list-item>
            </text:list>
          </draw:text-box>
        </draw:frame>
        <draw:frame draw:style-name="gr21" draw:text-style-name="P10" draw:layer="layout" svg:width="11.613cm" svg:height="12.769cm" svg:x="15.875cm" svg:y="3.106cm">
          <draw:image xlink:href="Pictures/10000001000003140000030DCE9D3322.png" xlink:type="simple" xlink:show="embed" xlink:actuate="onLoad" draw:mime-type="image/png">
            <text:p/>
          </draw:image>
        </draw:frame>
        <presentation:notes draw:style-name="dp1">
          <draw:page-thumbnail draw:style-name="gr17" draw:layer="layout" svg:width="19.798cm" svg:height="11.136cm" svg:x="0.6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2cm" svg:height="2.63cm" svg:x="1.4cm" svg:y="0.627cm" presentation:class="title" presentation:user-transformed="true">
          <draw:text-box>
            <text:p>CNN Architecture</text:p>
          </draw:text-box>
        </draw:frame>
        <draw:frame presentation:style-name="pr3" draw:layer="layout" svg:width="25.2cm" svg:height="9.134cm" svg:x="1.4cm" svg:y="3.684cm" presentation:class="outline">
          <draw:text-box>
            <text:list text:style-name="L2">
              <text:list-item>
                <text:p text:style-name="P16"><text:span text:style-name="T4">Conv1 layer → SiLU → Conv1 layer → </text:span><text:span text:style-name="T4"><text:line-break/></text:span><text:span text:style-name="T4">SiLU → Conv1 layer→ SiLU → Conv1</text:span><text:span text:style-name="T5"> layer</text:span></text:p>
              </text:list-item>
              <text:list-item>
                <text:p text:style-name="P16"><text:span text:style-name="T5">Transformer ermöglichen unterschiedlich lange</text:span><text:span text:style-name="T5"><text:line-break/></text:span><text:span text:style-name="T5">trajektorien</text:span></text:p>
              </text:list-item>
            </text:list>
          </draw:text-box>
        </draw:frame>
        <draw:frame draw:style-name="gr21" draw:text-style-name="P10" draw:layer="layout" svg:width="12.987cm" svg:height="12.872cm" svg:x="15.013cm" svg:y="2.845cm">
          <draw:image xlink:href="Pictures/10000001000003140000030D03F3A5A6.png" xlink:type="simple" xlink:show="embed" xlink:actuate="onLoad" draw:mime-type="image/png">
            <text:p/>
          </draw:image>
        </draw:frame>
        <presentation:notes draw:style-name="dp2">
          <draw:page-thumbnail draw:style-name="gr17" draw:layer="layout" svg:width="19.798cm" svg:height="11.136cm" svg:x="0.6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2cm" svg:height="2.63cm" svg:x="1.4cm" svg:y="0.627cm" presentation:class="title">
          <draw:text-box>
            <text:p>Ideas for next week</text:p>
          </draw:text-box>
        </draw:frame>
        <draw:frame presentation:style-name="pr3" draw:layer="layout" svg:width="25.2cm" svg:height="10.921cm" svg:x="1.4cm" svg:y="3.049cm" presentation:class="outline" presentation:user-transformed="true">
          <draw:text-box>
            <text:list text:style-name="L2">
              <text:list-item>
                <text:p>Die Patchify encoding weiter nachschauen</text:p>
              </text:list-item>
              <text:list-item>
                <text:p>Nachschauen, wie das in dem Motion planer diffusion model gemacht wird die Trajektorie zu encoden → wie genau gibt er seine Trajektorie in das Network rein</text:p>
              </text:list-item>
              <text:list-item>
                <text:p>CNN zum runter projezieren (2-3 hidden layers), dann MLP bevor man es wieder hochprojeziert</text:p>
              </text:list-item>
              <text:list-item>
                <text:p>Overfitting auf einem N-Shape</text:p>
              </text:list-item>
              <text:list-item>
                <text:p>Schauen, wie andere Paper CNN und MLP nutzen/kombinieren</text:p>
              </text:list-item>
              <text:list-item>
                <text:p>Unet- Architecture nachschauen</text:p>
              </text:list-item>
              <text:list-item>
                <text:p>B-spline als smootheness Hack nutzen</text:p>
              </text:list-item>
              <text:list-item>
                <text:p>(Flow-Matching kann bei verschiedenen Startdistributions starten)</text:p>
              </text:list-item>
            </text:list>
          </draw:text-box>
        </draw:frame>
        <presentation:notes draw:style-name="dp2">
          <draw:page-thumbnail draw:style-name="gr17" draw:layer="layout" svg:width="19.798cm" svg:height="11.136cm" svg:x="0.6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4cm" svg:height="7.575cm" svg:x="1.712cm" svg:y="2.485cm"/>
      <draw:page-thumbnail draw:layer="backgroundobjects" svg:width="7.574cm" svg:height="7.575cm" svg:x="1.712cm" svg:y="11.061cm"/>
      <draw:page-thumbnail draw:layer="backgroundobjects" svg:width="7.574cm" svg:height="7.575cm" svg:x="1.712cm" svg:y="19.637cm"/>
      <draw:page-thumbnail draw:layer="backgroundobjects" svg:width="7.574cm" svg:height="7.575cm" svg:x="11.712cm" svg:y="2.485cm"/>
      <draw:page-thumbnail draw:layer="backgroundobjects" svg:width="7.574cm" svg:height="7.575cm" svg:x="11.712cm" svg:y="11.061cm"/>
      <draw:page-thumbnail draw:layer="backgroundobjects" svg:width="7.574cm" svg:height="7.575cm" svg:x="11.712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2cm" svg:height="2.63cm" svg:x="1.4cm" svg:y="0.627cm" presentation:class="title" presentation:placeholder="true">
        <draw:text-box/>
      </draw:frame>
      <draw:frame presentation:style-name="Default-outline1" draw:layer="backgroundobjects" svg:width="25.2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4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4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6T15:27:20.589916549</meta:creation-date>
    <meta:editing-duration>PT3H21M16S</meta:editing-duration>
    <meta:editing-cycles>4</meta:editing-cycles>
    <meta:generator>LibreOffice/24.2.7.2$Linux_X86_64 LibreOffice_project/420$Build-2</meta:generator>
    <dc:date>2026-07-16T18:04:35.810524379</dc:date>
    <meta:document-statistic meta:object-count="98"/>
  </office:meta>
</office:document-meta>
</file>